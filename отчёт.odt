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YS Geo" svg:font-family="'YS Geo', apple-system, BlinkMacSystemFont, Arial, Helvetica, 'Arial Unicode MS', sans-serif"/>
  </office:font-face-decls>
  <office:automatic-styles>
    <style:style style:name="P1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officeooo:rsid="0011a926" officeooo:paragraph-rsid="0011a926" style:text-blinking="false" fo:background-color="transparent"/>
    </style:style>
    <style:style style:name="P2" style:family="paragraph" style:parent-style-name="Text_20_body">
      <style:paragraph-properties fo:margin-left="0cm" fo:margin-right="1.27cm" fo:margin-top="0.212cm" fo:margin-bottom="0.212cm" style:contextual-spacing="false" style:line-height-at-least="0.741cm" fo:text-indent="0cm" style:auto-text-indent="false"/>
      <style:text-properties fo:color="#000000" loext:opacity="100%" style:font-name="Arial2" fo:font-size="11pt" officeooo:rsid="0011a926"/>
    </style:style>
    <style:style style:name="P3" style:family="paragraph" style:parent-style-name="Text_20_body" style:list-style-name="L1">
      <style:paragraph-properties fo:margin-left="0cm" fo:margin-right="1.27cm" fo:margin-top="0.212cm" fo:margin-bottom="0.212cm" style:contextual-spacing="false" style:line-height-at-least="0.741cm" fo:text-indent="0cm" style:auto-text-indent="false" fo:padding="0cm" fo:border="none"/>
      <style:text-properties fo:color="#000000" loext:opacity="100%" style:font-name="Arial2" fo:font-size="11pt" officeooo:rsid="0011a926"/>
    </style:style>
    <style:style style:name="P4" style:family="paragraph" style:parent-style-name="Horizontal_20_Line">
      <style:paragraph-properties fo:margin-left="0cm" fo:margin-right="1.27cm" fo:margin-top="0cm" fo:margin-bottom="0.847cm" style:contextual-spacing="false" style:line-height-at-least="0.741cm" fo:text-indent="0cm" style:auto-text-indent="false"/>
      <style:text-properties fo:color="#000000" loext:opacity="100%" style:font-name="Arial2" fo:font-size="11pt" officeooo:rsid="0011a926"/>
    </style:style>
    <style:style style:name="P5" style:family="paragraph" style:parent-style-name="Heading_20_2">
      <style:paragraph-properties fo:margin-left="0cm" fo:margin-right="1.27cm" fo:margin-top="0.635cm" fo:margin-bottom="0.318cm" style:contextual-spacing="false" style:line-height-at-least="0.741cm" fo:text-indent="0cm" style:auto-text-indent="false"/>
      <style:text-properties fo:font-variant="normal" fo:text-transform="none" fo:color="#000000" loext:opacity="90%" style:font-name="YS Geo" fo:font-size="15pt" fo:letter-spacing="normal" fo:font-style="normal" fo:font-weight="bold" officeooo:rsid="0011a926" loext:padding="0cm" loext:border="none"/>
    </style:style>
    <style:style style:name="P6" style:family="paragraph" style:parent-style-name="Heading_20_3">
      <style:paragraph-properties fo:margin-left="0cm" fo:margin-right="1.27cm" fo:margin-top="0.529cm" fo:margin-bottom="0.212cm" style:contextual-spacing="false" style:line-height-at-least="0.741cm" fo:text-indent="0cm" style:auto-text-indent="false"/>
      <style:text-properties fo:font-variant="normal" fo:text-transform="none" fo:color="#000000" loext:opacity="90%" style:font-name="YS Geo" fo:font-size="13.5pt" fo:letter-spacing="normal" fo:font-style="normal" fo:font-weight="bold" officeooo:rsid="0011a926" loext:padding="0cm" loext:border="none"/>
    </style:style>
    <style:style style:name="P7" style:family="paragraph" style:parent-style-name="Text_20_body">
      <style:paragraph-properties fo:margin-left="0cm" fo:margin-right="1.27cm" fo:margin-top="0.212cm" fo:margin-bottom="0.212cm" style:contextual-spacing="false" style:line-height-at-least="0.741cm" fo:text-indent="0cm" style:auto-text-indent="false"/>
      <style:text-properties fo:font-variant="normal" fo:text-transform="none" fo:color="#000000" loext:opacity="90%" style:font-name="YS Geo" fo:font-size="12pt" fo:letter-spacing="normal" fo:font-style="normal" fo:font-weight="normal" officeooo:rsid="0011a926" loext:padding="0cm" loext:border="none"/>
    </style:style>
    <style:style style:name="P8" style:family="paragraph" style:parent-style-name="Text_20_body" style:list-style-name="L2">
      <style:paragraph-properties fo:margin-left="0cm" fo:margin-right="1.27cm" fo:margin-top="0.212cm" fo:margin-bottom="0.212cm" style:contextual-spacing="false" style:line-height-at-least="0.741cm" fo:text-indent="0cm" style:auto-text-indent="false" fo:padding="0cm" fo:border="none"/>
      <style:text-properties fo:color="#000000" loext:opacity="100%" style:font-name="Arial2" fo:font-size="11pt" officeooo:rsid="0011a926"/>
    </style:style>
    <style:style style:name="P9" style:family="paragraph" style:parent-style-name="Text_20_body" style:list-style-name="L2">
      <style:paragraph-properties fo:margin-left="0cm" fo:margin-right="1.27cm" fo:margin-top="0.212cm" fo:margin-bottom="0.212cm" style:contextual-spacing="false" style:line-height-at-least="0.582cm" fo:text-indent="0cm" style:auto-text-indent="false" fo:padding="0cm" fo:border="none"/>
      <style:text-properties fo:color="#000000" loext:opacity="100%" style:font-name="Arial2" fo:font-size="11pt" officeooo:rsid="0011a926"/>
    </style:style>
    <style:style style:name="P10" style:family="paragraph" style:parent-style-name="Text_20_body">
      <style:paragraph-properties fo:margin-left="0cm" fo:margin-right="1.27cm" fo:margin-top="0.423cm" fo:margin-bottom="0.847cm" style:contextual-spacing="false" style:line-height-at-least="0.476cm" fo:text-indent="0cm" style:auto-text-indent="false"/>
      <style:text-properties fo:font-variant="normal" fo:text-transform="none" fo:color="#000000" loext:opacity="70%" style:font-name="YS Geo" fo:font-size="10.5pt" fo:letter-spacing="normal" fo:font-style="normal" fo:font-weight="normal" officeooo:rsid="0011a926" fo:background-color="#fcfcfc" loext:padding="0cm" loext:border="none"/>
    </style:style>
    <style:style style:name="P11" style:family="paragraph" style:parent-style-name="Preformatted_20_Text">
      <style:paragraph-properties fo:margin-left="0cm" fo:margin-right="1.27cm" fo:margin-top="0cm" fo:margin-bottom="0cm" style:contextual-spacing="false" style:line-height-at-least="0.582cm" fo:text-indent="0cm" style:auto-text-indent="false" fo:padding="0cm" fo:border="none"/>
      <style:text-properties fo:color="#000000" loext:opacity="100%" style:font-name="Arial2" fo:font-size="11pt" officeooo:rsid="0011a926"/>
    </style:style>
    <style:style style:name="P12" style:family="paragraph" style:parent-style-name="Text_20_body" style:list-style-name="L3">
      <style:paragraph-properties fo:margin-left="0cm" fo:margin-right="1.27cm" fo:margin-top="0.212cm" fo:margin-bottom="0.212cm" style:contextual-spacing="false" fo:line-height="120%" fo:text-align="left" style:justify-single-word="false" fo:text-indent="0cm" style:auto-text-indent="false" fo:padding="0cm" fo:border="none"/>
      <style:text-properties fo:color="#000000" loext:opacity="100%" style:font-name="Arial2" fo:font-size="11pt" officeooo:rsid="0011a926"/>
    </style:style>
    <style:style style:name="P13" style:family="paragraph" style:parent-style-name="Text_20_body" style:list-style-name="L3">
      <style:paragraph-properties fo:margin-left="0cm" fo:margin-right="1.27cm" fo:margin-top="0.212cm" fo:margin-bottom="0.212cm" style:contextual-spacing="false" fo:line-height="120%" fo:text-align="left" style:justify-single-word="false" fo:text-indent="0cm" style:auto-text-indent="false" fo:padding="0cm" fo:border="none"/>
      <style:text-properties fo:font-variant="normal" fo:text-transform="none" fo:color="#000000" loext:opacity="90%" style:font-name="KaTeX Main" fo:font-size="12pt" fo:letter-spacing="normal" fo:font-style="normal" fo:font-weight="normal" officeooo:rsid="0011a926" loext:padding="0cm" loext:border="none"/>
    </style:style>
    <style:style style:name="P14" style:family="paragraph" style:parent-style-name="Text_20_body" style:list-style-name="L3">
      <style:paragraph-properties fo:margin-left="0cm" fo:margin-right="1.27cm" fo:margin-top="0.212cm" fo:margin-bottom="0.212cm" style:contextual-spacing="false" style:line-height-at-least="0.741cm" fo:text-indent="0cm" style:auto-text-indent="false" fo:padding="0cm" fo:border="none"/>
      <style:text-properties fo:color="#000000" loext:opacity="100%" style:font-name="Arial2" fo:font-size="11pt" officeooo:rsid="0011a926"/>
    </style:style>
    <style:style style:name="P15" style:family="paragraph" style:parent-style-name="Text_20_body" style:list-style-name="L3">
      <style:paragraph-properties fo:margin-left="0cm" fo:margin-right="1.217cm" fo:margin-top="0.212cm" fo:margin-bottom="0.212cm" style:contextual-spacing="false" fo:line-height="120%" fo:text-align="left" style:justify-single-word="false" fo:text-indent="0cm" style:auto-text-indent="false" fo:padding="0cm" fo:border="none"/>
      <style:text-properties fo:font-variant="normal" fo:text-transform="none" fo:color="#000000" loext:opacity="90%" style:font-name="KaTeX Main" fo:font-size="12pt" fo:letter-spacing="normal" fo:font-style="normal" fo:font-weight="normal" officeooo:rsid="0011a926" loext:padding="0cm" loext:border="none"/>
    </style:style>
    <style:style style:name="P16" style:family="paragraph" style:parent-style-name="Text_20_body" style:list-style-name="L4">
      <style:paragraph-properties fo:margin-left="0cm" fo:margin-right="1.27cm" fo:margin-top="0.212cm" fo:margin-bottom="0.212cm" style:contextual-spacing="false" style:line-height-at-least="0.741cm" fo:text-indent="0cm" style:auto-text-indent="false" fo:padding="0cm" fo:border="none"/>
      <style:text-properties fo:color="#000000" loext:opacity="100%" style:font-name="Arial2" fo:font-size="11pt" officeooo:rsid="0011a926"/>
    </style:style>
    <style:style style:name="P17" style:family="paragraph" style:parent-style-name="Text_20_body" style:list-style-name="L4">
      <style:paragraph-properties fo:margin-left="0cm" fo:margin-right="1.27cm" fo:margin-top="0.212cm" fo:margin-bottom="0.212cm" style:contextual-spacing="false" style:line-height-at-least="0.582cm" fo:text-indent="0cm" style:auto-text-indent="false" fo:padding="0cm" fo:border="none"/>
      <style:text-properties fo:color="#000000" loext:opacity="100%" style:font-name="Arial2" fo:font-size="11pt" officeooo:rsid="0011a926"/>
    </style:style>
    <style:style style:name="P18" style:family="paragraph" style:parent-style-name="Text_20_body" style:list-style-name="L5">
      <style:paragraph-properties fo:margin-left="0cm" fo:margin-right="1.27cm" fo:margin-top="0.212cm" fo:margin-bottom="0.212cm" style:contextual-spacing="false" style:line-height-at-least="0.741cm" fo:text-indent="0cm" style:auto-text-indent="false" fo:padding="0cm" fo:border="none"/>
      <style:text-properties fo:color="#000000" loext:opacity="100%" style:font-name="Arial2" fo:font-size="11pt" officeooo:rsid="0011a926"/>
    </style:style>
    <style:style style:name="P19" style:family="paragraph" style:parent-style-name="Text_20_body" style:list-style-name="L5">
      <style:paragraph-properties fo:margin-left="0cm" fo:margin-right="1.27cm" fo:margin-top="0.212cm" fo:margin-bottom="0.212cm" style:contextual-spacing="false" style:line-height-at-least="0.741cm" fo:text-indent="0cm" style:auto-text-indent="false" fo:padding="0cm" fo:border="none"/>
      <style:text-properties fo:font-variant="normal" fo:text-transform="none" fo:color="#000000" loext:opacity="90%" style:font-name="YS Geo" fo:font-size="12pt" fo:letter-spacing="normal" fo:font-style="normal" fo:font-weight="normal" officeooo:rsid="0011a926" loext:padding="0cm" loext:border="none"/>
    </style:style>
    <style:style style:name="P20" style:family="paragraph" style:parent-style-name="Text_20_body" style:list-style-name="L5">
      <style:paragraph-properties fo:margin-left="0cm" fo:margin-right="1.27cm" fo:margin-top="0.212cm" fo:margin-bottom="0.212cm" style:contextual-spacing="false" style:line-height-at-least="0.582cm" fo:text-indent="0cm" style:auto-text-indent="false" fo:padding="0cm" fo:border="none"/>
      <style:text-properties fo:color="#000000" loext:opacity="100%" style:font-name="Arial2" fo:font-size="11pt" officeooo:rsid="0011a926"/>
    </style:style>
    <style:style style:name="P21" style:family="paragraph" style:parent-style-name="Text_20_body" style:list-style-name="L6">
      <style:paragraph-properties fo:margin-left="0cm" fo:margin-right="1.27cm" fo:margin-top="0.212cm" fo:margin-bottom="0.212cm" style:contextual-spacing="false" style:line-height-at-least="0.741cm" fo:text-indent="0cm" style:auto-text-indent="false" fo:padding="0cm" fo:border="none"/>
      <style:text-properties fo:font-variant="normal" fo:text-transform="none" fo:color="#000000" loext:opacity="90%" style:font-name="YS Geo" fo:font-size="12pt" fo:letter-spacing="normal" fo:font-style="normal" fo:font-weight="normal" officeooo:rsid="0011a926" loext:padding="0cm" loext:border="none"/>
    </style:style>
    <style:style style:name="P22" style:family="paragraph" style:parent-style-name="Text_20_body" style:list-style-name="L6">
      <style:paragraph-properties fo:margin-left="0cm" fo:margin-right="1.27cm" fo:margin-top="0.212cm" fo:margin-bottom="0.212cm" style:contextual-spacing="false" fo:line-height="120%" fo:text-indent="0cm" style:auto-text-indent="false" fo:padding="0cm" fo:border="none"/>
      <style:text-properties fo:font-variant="normal" fo:text-transform="none" fo:color="#000000" loext:opacity="90%" style:font-name="YS Geo" fo:font-size="12pt" fo:letter-spacing="normal" fo:font-style="normal" fo:font-weight="normal" officeooo:rsid="0011a926" loext:padding="0cm" loext:border="none"/>
    </style:style>
    <style:style style:name="P23" style:family="paragraph" style:parent-style-name="Text_20_body" style:list-style-name="L7">
      <style:paragraph-properties fo:margin-left="0cm" fo:margin-right="1.27cm" fo:margin-top="0.212cm" fo:margin-bottom="0.212cm" style:contextual-spacing="false" fo:line-height="120%" fo:text-indent="0cm" style:auto-text-indent="false" fo:padding="0cm" fo:border="none"/>
      <style:text-properties fo:color="#000000" loext:opacity="100%" style:font-name="Arial2" fo:font-size="11pt" officeooo:rsid="0011a926"/>
    </style:style>
    <style:style style:name="P24" style:family="paragraph" style:parent-style-name="Text_20_body" style:list-style-name="L7">
      <style:paragraph-properties fo:margin-left="0cm" fo:margin-right="1.27cm" fo:margin-top="0.212cm" fo:margin-bottom="0.212cm" style:contextual-spacing="false" style:line-height-at-least="0.741cm" fo:text-indent="0cm" style:auto-text-indent="false" fo:padding="0cm" fo:border="none"/>
      <style:text-properties fo:color="#000000" loext:opacity="100%" style:font-name="Arial2" fo:font-size="11pt" officeooo:rsid="0011a926"/>
    </style:style>
    <style:style style:name="P25" style:family="paragraph" style:parent-style-name="Text_20_body" style:list-style-name="L7">
      <style:paragraph-properties fo:margin-left="0cm" fo:margin-right="1.27cm" fo:margin-top="0.212cm" fo:margin-bottom="0.212cm" style:contextual-spacing="false" style:line-height-at-least="0.582cm" fo:text-indent="0cm" style:auto-text-indent="false" fo:padding="0cm" fo:border="none"/>
      <style:text-properties fo:color="#000000" loext:opacity="100%" style:font-name="Arial2" fo:font-size="11pt" officeooo:rsid="0011a926"/>
    </style:style>
    <style:style style:name="P26" style:family="paragraph" style:parent-style-name="Text_20_body" style:list-style-name="L7">
      <style:paragraph-properties fo:margin-left="0cm" fo:margin-right="1.27cm" fo:margin-top="0.212cm" fo:margin-bottom="0.212cm" style:contextual-spacing="false" style:line-height-at-least="0.741cm" fo:text-indent="0cm" style:auto-text-indent="false" fo:padding="0cm" fo:border="none"/>
      <style:text-properties fo:font-variant="normal" fo:text-transform="none" fo:color="#000000" loext:opacity="90%" style:font-name="YS Geo" fo:font-size="12pt" fo:letter-spacing="normal" fo:font-style="normal" fo:font-weight="normal" officeooo:rsid="0011a926" loext:padding="0cm" loext:border="none"/>
    </style:style>
    <style:style style:name="P27" style:family="paragraph" style:parent-style-name="Quotations">
      <style:paragraph-properties fo:margin-left="1cm" fo:margin-right="2.27cm" fo:margin-top="0cm" fo:margin-bottom="0cm" style:contextual-spacing="false" style:line-height-at-least="0.582cm" fo:text-indent="0cm" style:auto-text-indent="false" fo:padding-left="0.635cm" fo:padding-right="0cm" fo:padding-top="0cm" fo:padding-bottom="0cm" fo:border-left="3pt solid #000000" fo:border-right="none" fo:border-top="none" fo:border-bottom="none"/>
      <style:text-properties fo:color="#000000" loext:opacity="100%" style:font-name="Arial2" fo:font-size="11pt" officeooo:rsid="0011a926"/>
    </style:style>
    <style:style style:name="P28" style:family="paragraph" style:parent-style-name="Heading_20_2">
      <style:paragraph-properties fo:margin-left="0cm" fo:margin-right="1.27cm" fo:margin-top="0.635cm" fo:margin-bottom="0.318cm" style:contextual-spacing="false" style:line-height-at-least="0.741cm" fo:text-indent="0cm" style:auto-text-indent="false"/>
      <style:text-properties fo:color="#000000" loext:opacity="90%" style:font-name="YS Geo" fo:font-size="15pt" officeooo:rsid="0011a926"/>
    </style:style>
    <style:style style:name="P29" style:family="paragraph" style:parent-style-name="Text_20_body" style:list-style-name="L8">
      <style:paragraph-properties fo:margin-left="0cm" fo:margin-right="1.27cm" fo:margin-top="0.212cm" fo:margin-bottom="0.212cm" style:contextual-spacing="false" style:line-height-at-least="0.741cm" fo:text-indent="0cm" style:auto-text-indent="false" fo:padding="0cm" fo:border="none"/>
      <style:text-properties fo:font-variant="normal" fo:text-transform="none" fo:color="#000000" loext:opacity="90%" style:font-name="YS Geo" fo:font-size="12pt" fo:letter-spacing="normal" fo:font-style="normal" fo:font-weight="normal" officeooo:rsid="0011a926" loext:padding="0cm" loext:border="none"/>
    </style:style>
    <style:style style:name="P30" style:family="paragraph" style:parent-style-name="Text_20_body" style:list-style-name="L8">
      <style:paragraph-properties fo:margin-left="0cm" fo:margin-right="1.27cm" fo:margin-top="0.212cm" fo:margin-bottom="0.212cm" style:contextual-spacing="false" style:line-height-at-least="0.582cm" fo:text-indent="0cm" style:auto-text-indent="false" fo:padding="0cm" fo:border="none"/>
      <style:text-properties fo:color="#000000" loext:opacity="100%" style:font-name="Arial2" fo:font-size="11pt" officeooo:rsid="0011a926"/>
    </style:style>
    <style:style style:name="P31" style:family="paragraph" style:parent-style-name="Text_20_body" style:list-style-name="L9">
      <style:paragraph-properties fo:margin-left="0cm" fo:margin-right="1.27cm" fo:margin-top="0.212cm" fo:margin-bottom="0.212cm" style:contextual-spacing="false" style:line-height-at-least="0.741cm" fo:text-indent="0cm" style:auto-text-indent="false" fo:padding="0cm" fo:border="none"/>
      <style:text-properties fo:color="#000000" loext:opacity="100%" style:font-name="Arial2" fo:font-size="11pt" officeooo:rsid="0011a926"/>
    </style:style>
    <style:style style:name="P32" style:family="paragraph" style:parent-style-name="Text_20_body" style:list-style-name="L10">
      <style:paragraph-properties fo:margin-left="0cm" fo:margin-right="1.27cm" fo:margin-top="0.212cm" fo:margin-bottom="0.212cm" style:contextual-spacing="false" style:line-height-at-least="0.582cm" fo:text-indent="0cm" style:auto-text-indent="false" fo:padding="0cm" fo:border="none"/>
      <style:text-properties fo:color="#000000" loext:opacity="100%" style:font-name="Arial2" fo:font-size="11pt" officeooo:rsid="0011a926"/>
    </style:style>
    <style:style style:name="P33" style:family="paragraph" style:parent-style-name="Text_20_body" style:list-style-name="L10">
      <style:paragraph-properties fo:margin-left="0cm" fo:margin-right="1.27cm" fo:margin-top="0.212cm" fo:margin-bottom="0.212cm" style:contextual-spacing="false" style:line-height-at-least="0.741cm" fo:text-indent="0cm" style:auto-text-indent="false" fo:padding="0cm" fo:border="none"/>
      <style:text-properties fo:font-variant="normal" fo:text-transform="none" fo:color="#000000" loext:opacity="90%" style:font-name="YS Geo" fo:font-size="12pt" fo:letter-spacing="normal" fo:font-style="normal" fo:font-weight="normal" officeooo:rsid="0011a926" loext:padding="0cm" loext:border="none"/>
    </style:style>
    <style:style style:name="P34" style:family="paragraph" style:parent-style-name="Text_20_body">
      <style:paragraph-properties fo:margin-left="0cm" fo:margin-right="1.27cm" fo:margin-top="0.212cm" fo:margin-bottom="0cm" style:contextual-spacing="false" style:line-height-at-least="0.741cm" fo:text-indent="0cm" style:auto-text-indent="false"/>
      <style:text-properties fo:font-variant="normal" fo:text-transform="none" fo:color="#000000" loext:opacity="90%" style:font-name="YS Geo" fo:font-size="12pt" fo:letter-spacing="normal" fo:font-style="normal" fo:font-weight="normal" officeooo:rsid="0011a926" loext:padding="0cm" loext:border="none"/>
    </style:style>
    <style:style style:name="P35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Arial2" fo:font-size="11pt" officeooo:rsid="0011a926"/>
    </style:style>
    <style:style style:name="P36" style:family="paragraph" style:parent-style-name="Standard">
      <style:paragraph-properties fo:margin-left="0cm" fo:margin-right="0cm" fo:text-indent="0cm" style:auto-text-indent="false"/>
    </style:style>
    <style:style style:name="P37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color="#000000" loext:opacity="90%" style:font-name="YS Geo" fo:font-size="12pt" fo:font-weight="bold"/>
    </style:style>
    <style:style style:name="T2" style:family="text">
      <style:text-properties fo:color="#000000" loext:opacity="90%" style:font-name="YS Geo" fo:font-size="12pt"/>
    </style:style>
    <style:style style:name="T3" style:family="text">
      <style:text-properties fo:font-variant="normal" fo:text-transform="none" fo:color="#000000" loext:opacity="90%" style:font-name="YS Geo" fo:font-size="12pt" fo:letter-spacing="normal" fo:font-style="normal" fo:font-weight="bold" loext:padding="0cm" loext:border="none"/>
    </style:style>
    <style:style style:name="T4" style:family="text">
      <style:text-properties fo:font-variant="normal" fo:text-transform="none" fo:color="#000000" loext:opacity="90%" style:font-name="YS Geo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00" loext:opacity="70%" fo:font-family="Consolas, Menlo, Monaco, 'Lucida Console', 'DejaVu Sans Mono', 'Bitstream Vera Sans Mono', monospace, sans-serif" fo:font-size="10.5pt" fo:letter-spacing="normal" fo:font-style="normal" fo:font-weight="normal" fo:background-color="#fcfcfc" loext:char-shading-value="0" loext:padding="0cm" loext:border="none"/>
    </style:style>
    <style:style style:name="T6" style:family="text">
      <style:text-properties fo:font-variant="normal" fo:text-transform="none" fo:color="#6a737d" loext:opacity="100%" fo:font-family="Consolas, Menlo, Monaco, 'Lucida Console', 'DejaVu Sans Mono', 'Bitstream Vera Sans Mono', monospace, sans-serif" fo:font-size="10.5pt" fo:letter-spacing="normal" fo:font-style="normal" fo:font-weight="normal" fo:background-color="#fcfcfc" loext:char-shading-value="0" loext:padding="0cm" loext:border="none"/>
    </style:style>
    <style:style style:name="T7" style:family="text">
      <style:text-properties fo:font-variant="normal" fo:text-transform="none" fo:color="#e36209" loext:opacity="100%" fo:font-family="Consolas, Menlo, Monaco, 'Lucida Console', 'DejaVu Sans Mono', 'Bitstream Vera Sans Mono', monospace, sans-serif" fo:font-size="10.5pt" fo:letter-spacing="normal" fo:font-style="normal" fo:font-weight="normal" fo:background-color="#fcfcfc" loext:char-shading-value="0" loext:padding="0cm" loext:border="none"/>
    </style:style>
    <style:style style:name="T8" style:family="text">
      <style:text-properties fo:font-variant="normal" fo:text-transform="none" fo:color="#005cc5" loext:opacity="100%" fo:font-family="Consolas, Menlo, Monaco, 'Lucida Console', 'DejaVu Sans Mono', 'Bitstream Vera Sans Mono', monospace, sans-serif" fo:font-size="10.5pt" fo:letter-spacing="normal" fo:font-style="normal" fo:font-weight="normal" fo:background-color="#fcfcfc" loext:char-shading-value="0" loext:padding="0cm" loext:border="none"/>
    </style:style>
    <style:style style:name="T9" style:family="text">
      <style:text-properties fo:font-variant="normal" fo:text-transform="none" fo:color="#d73a49" loext:opacity="100%" fo:font-family="Consolas, Menlo, Monaco, 'Lucida Console', 'DejaVu Sans Mono', 'Bitstream Vera Sans Mono', monospace, sans-serif" fo:font-size="10.5pt" fo:letter-spacing="normal" fo:font-style="normal" fo:font-weight="normal" fo:background-color="#fcfcfc" loext:char-shading-value="0" loext:padding="0cm" loext:border="none"/>
    </style:style>
    <style:style style:name="T10" style:family="text">
      <style:text-properties fo:font-variant="normal" fo:text-transform="none" fo:color="#000000" loext:opacity="70%" fo:letter-spacing="normal" fo:background-color="#fcfcfc" loext:char-shading-value="0" loext:padding="0cm" loext:border="none"/>
    </style:style>
    <style:style style:name="T11" style:family="text">
      <style:text-properties fo:font-variant="normal" fo:text-transform="none" fo:color="#032f62" loext:opacity="100%" fo:font-family="Consolas, Menlo, Monaco, 'Lucida Console', 'DejaVu Sans Mono', 'Bitstream Vera Sans Mono', monospace, sans-serif" fo:font-size="10.5pt" fo:letter-spacing="normal" fo:font-style="normal" fo:font-weight="normal" fo:background-color="#fcfcfc" loext:char-shading-value="0" loext:padding="0cm" loext:border="none"/>
    </style:style>
    <style:style style:name="T12" style:family="text">
      <style:text-properties fo:font-variant="normal" fo:text-transform="none" fo:color="#24292e" loext:opacity="100%" fo:font-family="Consolas, Menlo, Monaco, 'Lucida Console', 'DejaVu Sans Mono', 'Bitstream Vera Sans Mono', monospace, sans-serif" fo:font-size="10.5pt" fo:letter-spacing="normal" fo:font-style="normal" fo:font-weight="normal" fo:background-color="#fcfcfc" loext:char-shading-value="0" loext:padding="0cm" loext:border="none"/>
    </style:style>
    <style:style style:name="T13" style:family="text">
      <style:text-properties fo:font-variant="normal" fo:text-transform="none" fo:color="#000000" loext:opacity="90%" fo:font-family="'KaTeX Math'" fo:font-size="12pt" fo:letter-spacing="normal" fo:font-style="italic" fo:font-weight="normal" loext:padding="0cm" loext:border="none"/>
    </style:style>
    <style:style style:name="T14" style:family="text">
      <style:text-properties fo:font-variant="normal" fo:text-transform="none" fo:color="#000000" loext:opacity="90%" style:font-name="KaTeX Main" fo:font-size="12pt" fo:letter-spacing="normal" fo:font-style="normal" fo:font-weight="normal" loext:padding="0cm" loext:border="none"/>
    </style:style>
    <style:style style:name="T15" style:family="text">
      <style:text-properties fo:font-family="'KaTeX Caligraphic'"/>
    </style:style>
    <style:style style:name="T16" style:family="text">
      <style:text-properties fo:font-family="'KaTeX Math'" fo:font-style="italic"/>
    </style:style>
    <style:style style:name="T17" style:family="text">
      <style:text-properties fo:font-family="'Times New Roman'" style:font-family-generic="roman" style:font-pitch="variable"/>
    </style:style>
    <style:style style:name="T18" style:family="text">
      <style:text-properties fo:font-variant="normal" fo:text-transform="none" fo:color="#000000" loext:opacity="70%" style:font-name="YS Geo" fo:font-size="12pt" fo:letter-spacing="normal" fo:font-style="normal" fo:font-weight="normal" loext:padding="0cm" loext:border="none"/>
    </style:style>
    <style:style style:name="T19" style:family="text">
      <style:text-properties fo:font-variant="normal" fo:text-transform="none" fo:letter-spacing="normal" fo:font-style="normal" fo:font-weight="bold" loext:padding="0cm" loext:border="none"/>
    </style:style>
    <style:style style:name="T20" style:family="text">
      <style:text-properties fo:font-variant="normal" fo:text-transform="none" fo:font-size="12pt" fo:letter-spacing="normal" fo:font-style="normal" fo:font-weight="bold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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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Задача.</text:span></text:span><text:span text:style-name="T2"> Есть предобученный генератор (например, StyleGAN‑2), который хорошо генерирует фотореалистичные лица. Нужно с минимальными усилиями перенастроить его так, чтобы он генерировал лица в другом домене — например, в стиле аниме, скетча или под конкретного персонажа (вроде Джокера). При этом хочется управлять генерацией через текст («аниме-девушка с кошачьими ушами»), а не только через латентные векторы.</text:span></text:p>
      <text:section text:style-name="Sect1" text:name="2eae231a-f208553f-24e73c1c-fff8738a">
        <text:p text:style-name="P2"><text:span text:style-name="Strong_20_Emphasis"><text:span text:style-name="T3">Почему это важно.</text:span></text:span><text:span text:style-name="T4"> Переобучать GAN с нуля дорого: нужны огромные датасеты, много GPU, тонкая настройка. Domain adaptation позволяет взять мощную предобученную модель и «докрутить» её под новый стиль. Это востребовано в креативных индустриях (стилизация аватаров, концепт-арт), в исследованиях генеративных моделей и в продакшене, где важна скорость прототипирования.</text:span></text:p>
        <text:p text:style-name="P2"><text:span text:style-name="Strong_20_Emphasis"><text:span text:style-name="T3">Почему StyleCLIP не идеален.</text:span></text:span><text:span text:style-name="T4"> StyleCLIP решает близкую задачу (редактирование и «наведение» генерации через CLIP), но у него есть ограничения:</text:span></text:p>
        <text:list text:style-name="L1">
          <text:list-item>
            <text:p text:style-name="P3"><text:span text:style-name="Strong_20_Emphasis"><text:span text:style-name="T3">Редактирование, а не генерация.</text:span></text:span><text:span text:style-name="T4"> StyleCLIP чаще берёт уже сгенерированное изображение и двигает его по латентному пространству под текстовый промпт. Для полноценной адаптации домена этого недостаточно: модель по-прежнему «живет» в исходном распределении.</text:span></text:p>
          </text:list-item>
          <text:list-item>
            <text:p text:style-name="P3"><text:span text:style-name="Strong_20_Emphasis"><text:span text:style-name="T3">Ограниченная гибкость направления.</text:span></text:span><text:span text:style-name="T4"> В StyleCLIP направления в латентном пространстве часто вычисляются эвристически или требуют подбора. Они могут «ломать» важные атрибуты (возраст, пол, позу) при сильном сдвиге.</text:span></text:p>
          </text:list-item>
          <text:list-item>
            <text:p text:style-name="P3"><text:span text:style-name="Strong_20_Emphasis"><text:span text:style-name="T3">Отсутствие явного обучения генератора.</text:span></text:span><text:span text:style-name="T4"> StyleCLIP не дообучает веса генератора, а лишь находит пути в его латентном пространстве. Если целевой домен сильно отличается (фото → аниме), таких путей может просто не существовать без искажения структуры.</text:span></text:p>
          </text:list-item>
          <text:list-item>
            <text:p text:style-name="P3"><text:span text:style-name="Strong_20_Emphasis"><text:span text:style-name="T3">Проблемы с композицией и семантикой.</text:span></text:span><text:span text:style-name="T4"> CLIP хорошо ловит общий стиль и объекты, но может игнорировать тонкие композиционные детали. Промпт «аниме с большими глазами» может дать большие глаза, но сломать анатомию.</text:span></text:p>
          </text:list-item>
        </text:list>
        <text:p text:style-name="P4"/>
        <text:h text:style-name="P5" text:outline-level="2"><text:soft-page-break/>Описание решения</text:h>
        <text:p text:style-name="P2"><text:span text:style-name="T4">Идея CLIP‑guided domain adaptation (в духе StyleGAN‑NADA) — не просто «ходить» по латентам StyleGAN, а </text:span><text:span text:style-name="Strong_20_Emphasis"><text:span text:style-name="T3">дообучить копию генератора</text:span></text:span><text:span text:style-name="T4"> так, чтобы она сразу выдавала изображения нужного домена, при этом используя CLIP как «компас» для оценки близости к целевому стилю.</text:span></text:p>
        <text:h text:style-name="P6" text:outline-level="3">Как искать замороженные слои</text:h>
        <text:p text:style-name="P7">В StyleGAN‑2 генерация идёт послойно (mapping network → synthesis network, где synthesis состоит из блоков для разных разрешений). Чтобы не «сломать» базовую генеративную способность и сэкономить ресурсы, дообучают не всю сеть, а только часть слоёв.</text:p>
        <text:p text:style-name="P2"><text:span text:style-name="Strong_20_Emphasis"><text:span text:style-name="T3">Как это делают на практике:</text:span></text:span></text:p>
        <text:list text:style-name="L2">
          <text:list-item>
            <text:p text:style-name="P8"><text:span text:style-name="Strong_20_Emphasis"><text:span text:style-name="T3">Иерархия разрешений.</text:span></text:span><text:span text:style-name="T4"> Блоки в synthesis network отвечают за разные уровни детализации: низкие разрешения (4×4, 8×8) задают общую структуру и позу, высокие (32×32 и выше) — текстуру и мелкие детали. Для смены стиля (фото → аниме) чаще всего достаточно дообучать блоки средних и высоких разрешений, оставляя низкие замороженными.</text:span></text:p>
          </text:list-item>
          <text:list-item>
            <text:p text:style-name="P8"><text:span text:style-name="Strong_20_Emphasis"><text:span text:style-name="T3">Эмпирический отбор.</text:span></text:span><text:span text:style-name="T4"> Запускают обучение с разными конфигурациями «размороженных» слоёв и смотрят, где быстрее появляется нужный стиль без потери качества/структуры. Обычно начинают с верхних 50–70% слоёв (по числу параметров это меньше, чем полная сеть).</text:span></text:p>
          </text:list-item>
          <text:list-item>
            <text:p text:style-name="P8"><text:span text:style-name="Strong_20_Emphasis"><text:span text:style-name="T3">Метрики качества.</text:span></text:span><text:span text:style-name="T4"> Используют FID (Fréchet Inception Distance) по отношению к целевому домену (например, датасет аниме) и визуальный контроль. Если при разморозке нижних слоёв модель начинает генерировать «кашу» вместо лиц — эти слои замораживают.</text:span></text:p>
          </text:list-item>
          <text:list-item>
            <text:p text:style-name="P9"><text:span text:style-name="Strong_20_Emphasis"><text:span text:style-name="T3">В коде это выглядит как маска параметров.</text:span></text:span><text:span text:style-name="T4"> Ты создаёшь список </text:span><text:span text:style-name="Source_20_Text"><text:span text:style-name="T5">params_to_train</text:span></text:span><text:span text:style-name="T4">, куда попадают только веса выбранных блоков, и передаёшь его в оптимизатор. Остальные веса остаются </text:span><text:span text:style-name="Source_20_Text"><text:span text:style-name="T5">requires_grad=False</text:span></text:span><text:span text:style-name="T4">.</text:span></text:p>
          </text:list-item>
        </text:list>
        <text:p text:style-name="P7">Пример логики на PyTorch (упрощённо):</text:p>
        <text:p text:style-name="P10">python</text:p>
        <text:p text:style-name="P11"><text:soft-page-break/><text:span text:style-name="Source_20_Text"><text:span text:style-name="T6"># Допустим, self.G_train — обучаемая копия генератора</text:span></text:span></text:p>
        <text:p text:style-name="P11"><text:span text:style-name="Source_20_Text"><text:span text:style-name="T6"># self.G_frozen — замороженная версия для референса</text:span></text:span></text:p>
        <text:p text:style-name="P11"/>
        <text:p text:style-name="P11"><text:span text:style-name="Source_20_Text"><text:span text:style-name="T6"># Определяем, какие слои (по индексам) будем дообучать</text:span></text:span></text:p>
        <text:p text:style-name="P11"><text:span text:style-name="Source_20_Text"><text:span text:style-name="T5">layers_to_unfreeze = </text:span></text:span><text:span text:style-name="Source_20_Text"><text:span text:style-name="T7">list</text:span></text:span><text:span text:style-name="Source_20_Text"><text:span text:style-name="T5">(</text:span></text:span><text:span text:style-name="Source_20_Text"><text:span text:style-name="T7">range</text:span></text:span><text:span text:style-name="Source_20_Text"><text:span text:style-name="T5">(</text:span></text:span><text:span text:style-name="Source_20_Text"><text:span text:style-name="T8">8</text:span></text:span><text:span text:style-name="Source_20_Text"><text:span text:style-name="T5">, </text:span></text:span><text:span text:style-name="Source_20_Text"><text:span text:style-name="T8">18</text:span></text:span><text:span text:style-name="Source_20_Text"><text:span text:style-name="T5">)) <text:s/></text:span></text:span><text:span text:style-name="Source_20_Text"><text:span text:style-name="T6"># пример: слои с 8 по 17</text:span></text:span></text:p>
        <text:p text:style-name="P11"/>
        <text:p text:style-name="P11"><text:span text:style-name="Source_20_Text"><text:span text:style-name="T9">for</text:span></text:span><text:span text:style-name="Source_20_Text"><text:span text:style-name="T5"> name, param </text:span></text:span><text:span text:style-name="Source_20_Text"><text:span text:style-name="T9">in</text:span></text:span><text:span text:style-name="Source_20_Text"><text:span text:style-name="T5"> </text:span></text:span><text:span text:style-name="Source_20_Text"><text:span text:style-name="T9">self</text:span></text:span><text:span text:style-name="Source_20_Text"><text:span text:style-name="T5">.G_train.named_parameters():</text:span></text:span></text:p>
        <text:p text:style-name="P11"><text:span text:style-name="Source_20_Text"><text:span text:style-name="T10"><text:s text:c="4"/></text:span></text:span><text:span text:style-name="Source_20_Text"><text:span text:style-name="T6"># В StyleGAN-2 имена параметров содержат информацию о слоях, например 'synthesis.b8.conv1.weight'</text:span></text:span></text:p>
        <text:p text:style-name="P11"><text:span text:style-name="Source_20_Text"><text:span text:style-name="T10"><text:s text:c="4"/></text:span></text:span><text:span text:style-name="Source_20_Text"><text:span text:style-name="T5">is_target_layer = </text:span></text:span><text:span text:style-name="Source_20_Text"><text:span text:style-name="T7">any</text:span></text:span><text:span text:style-name="Source_20_Text"><text:span text:style-name="T5">(</text:span></text:span><text:span text:style-name="Source_20_Text"><text:span text:style-name="T11">f'b</text:span></text:span><text:span text:style-name="Source_20_Text"><text:span text:style-name="T12">{i}</text:span></text:span><text:span text:style-name="Source_20_Text"><text:span text:style-name="T11">'</text:span></text:span><text:span text:style-name="Source_20_Text"><text:span text:style-name="T5"> </text:span></text:span><text:span text:style-name="Source_20_Text"><text:span text:style-name="T9">in</text:span></text:span><text:span text:style-name="Source_20_Text"><text:span text:style-name="T5"> name </text:span></text:span><text:span text:style-name="Source_20_Text"><text:span text:style-name="T9">for</text:span></text:span><text:span text:style-name="Source_20_Text"><text:span text:style-name="T5"> i </text:span></text:span><text:span text:style-name="Source_20_Text"><text:span text:style-name="T9">in</text:span></text:span><text:span text:style-name="Source_20_Text"><text:span text:style-name="T5"> layers_to_unfreeze)</text:span></text:span></text:p>
        <text:p text:style-name="P11"><text:span text:style-name="Source_20_Text"><text:span text:style-name="T10"><text:s text:c="4"/></text:span></text:span><text:span text:style-name="Source_20_Text"><text:span text:style-name="T9">if</text:span></text:span><text:span text:style-name="Source_20_Text"><text:span text:style-name="T5"> is_target_layer:</text:span></text:span></text:p>
        <text:p text:style-name="P11"><text:span text:style-name="Source_20_Text"><text:span text:style-name="T10"><text:s text:c="8"/></text:span></text:span><text:span text:style-name="Source_20_Text"><text:span text:style-name="T5">param.requires_grad = </text:span></text:span><text:span text:style-name="Source_20_Text"><text:span text:style-name="T8">True</text:span></text:span></text:p>
        <text:p text:style-name="P11"><text:span text:style-name="Source_20_Text"><text:span text:style-name="T10"><text:s text:c="4"/></text:span></text:span><text:span text:style-name="Source_20_Text"><text:span text:style-name="T9">else</text:span></text:span><text:span text:style-name="Source_20_Text"><text:span text:style-name="T5">:</text:span></text:span></text:p>
        <text:p text:style-name="P11"><text:span text:style-name="Source_20_Text"><text:span text:style-name="T10"><text:s text:c="8"/></text:span></text:span><text:span text:style-name="Source_20_Text"><text:span text:style-name="T5">param.requires_grad = </text:span></text:span><text:span text:style-name="Source_20_Text"><text:span text:style-name="T8">False</text:span></text:span></text:p>
        <text:p text:style-name="P11"/>
        <text:p text:style-name="P11"><text:span text:style-name="Source_20_Text"><text:span text:style-name="T6"># Оптимизатор видит только те параметры, у которых requires_grad=True</text:span></text:span></text:p>
        <text:p text:style-name="P11"><text:span text:style-name="Source_20_Text"><text:span text:style-name="T5">optimizer = torch.optim.Adam(</text:span></text:span></text:p>
        <text:p text:style-name="P11"><text:span text:style-name="Source_20_Text"><text:span text:style-name="T10"><text:s text:c="4"/></text:span></text:span><text:span text:style-name="Source_20_Text"><text:span text:style-name="T5">[p </text:span></text:span><text:span text:style-name="Source_20_Text"><text:span text:style-name="T9">for</text:span></text:span><text:span text:style-name="Source_20_Text"><text:span text:style-name="T5"> p </text:span></text:span><text:span text:style-name="Source_20_Text"><text:span text:style-name="T9">in</text:span></text:span><text:span text:style-name="Source_20_Text"><text:span text:style-name="T5"> </text:span></text:span><text:span text:style-name="Source_20_Text"><text:span text:style-name="T9">self</text:span></text:span><text:span text:style-name="Source_20_Text"><text:span text:style-name="T5">.G_train.parameters() </text:span></text:span><text:span text:style-name="Source_20_Text"><text:span text:style-name="T9">if</text:span></text:span><text:span text:style-name="Source_20_Text"><text:span text:style-name="T5"> p.requires_grad],</text:span></text:span></text:p>
        <text:p text:style-name="P11"><text:span text:style-name="Source_20_Text"><text:span text:style-name="T10"><text:s text:c="4"/></text:span></text:span><text:span text:style-name="Source_20_Text"><text:span text:style-name="T5">lr=</text:span></text:span><text:span text:style-name="Source_20_Text"><text:span text:style-name="T8">0.002</text:span></text:span></text:p>
        <text:p text:style-name="P11"><text:span text:style-name="Source_20_Text"><text:span text:style-name="T5">)</text:span></text:span></text:p>
        <text:p text:style-name="P4"/>
        <text:h text:style-name="P6" text:outline-level="3">Как строить само обучение</text:h>
        <text:p text:style-name="P7">Ключевая идея — использовать CLIP как функцию потерь, которая «подталкивает» G_train к целевому домену, при этом сохраняя связь с G_frozen (чтобы не потерять качество и структуру).</text:p>
        <text:p text:style-name="P2"><text:span text:style-name="Strong_20_Emphasis"><text:span text:style-name="T3">Основные компоненты лосса:</text:span></text:span></text:p>
        <text:list text:style-name="L3">
          <text:list-item>
            <text:p text:style-name="P12"><text:span text:style-name="Strong_20_Emphasis"><text:span text:style-name="T3">CLIP-loss (Image–Text similarity).</text:span></text:span><text:span text:style-name="T4"> Генерируешь изображение </text:span><text:span text:style-name="T13">x</text:span><text:span text:style-name="T4"> из случайного латента </text:span><text:span text:style-name="T13">z</text:span><text:span text:style-name="T4">, кодируешь его через CLIP-image encoder </text:span><text:span text:style-name="T13">Eimg</text:span><text:span text:style-name="T14">​(</text:span><text:span text:style-name="T13">x</text:span><text:span text:style-name="T14">)</text:span><text:span text:style-name="T4">, берёшь текстовый эмбеддинг </text:span><text:span text:style-name="T13">Etxt</text:span><text:span text:style-name="T14">​(</text:span><text:span text:style-name="T13">t</text:span><text:span text:style-name="T14">)</text:span><text:span text:style-name="T4"> для промпта целевого домена (например, «anime face») и максимизируешь косинусное сходство:</text:span></text:p>
            <text:p text:style-name="P13"><text:span text:style-name="T15">L</text:span><text:span text:style-name="T16">CLIP</text:span>​=−cos(<text:span text:style-name="T16">Eimg</text:span>​(<text:span text:style-name="T16">x</text:span>),<text:span text:style-name="T16">Etxt</text:span>​(<text:span text:style-name="T16">t</text:span>))</text:p>
          </text:list-item>
          <text:list-item>
            <text:p text:style-name="P14"><text:span text:style-name="Strong_20_Emphasis"><text:span text:style-name="T3">Perceptual loss / Feature consistency.</text:span></text:span><text:span text:style-name="T4"> Чтобы G_train не «улетел» слишком далеко от G_frozen и</text:span><text:soft-page-break/><text:span text:style-name="T4"> сохранил общую структуру, добавляют потерю по промежуточным признакам (например, через VGG или те же фичи CLIP):</text:span></text:p>
            <text:p text:style-name="P15"><text:span text:style-name="T15">L</text:span><text:span text:style-name="T16">feat</text:span>​=∥<text:span text:style-name="T16">ϕ</text:span>(<text:span text:style-name="T16">Gtrain</text:span>​(<text:span text:style-name="T16">z</text:span>))−<text:span text:style-name="T16">ϕ</text:span>(<text:span text:style-name="T16">Gfrozen</text:span>​(<text:span text:style-name="T16">z</text:span>))∥2​</text:p>
          </text:list-item>
          <text:list-item>
            <text:p text:style-name="P14"><text:span text:style-name="Strong_20_Emphasis"><text:span text:style-name="T3">Regularization на латент.</text:span></text:span><text:span text:style-name="T4"> Иногда стабилизируют обучение, ограничивая изменения в W/W+ пространстве, чтобы не ломать семантику.</text:span></text:p>
          </text:list-item>
        </text:list>
        <text:p text:style-name="P2"><text:span text:style-name="Strong_20_Emphasis"><text:span text:style-name="T3">Типичный цикл обучения (псевдокод):</text:span></text:span></text:p>
        <text:p text:style-name="P10">python</text:p>
        <text:p text:style-name="P11"><text:span text:style-name="Source_20_Text"><text:span text:style-name="T5">clip_model, preprocess = clip.load(</text:span></text:span><text:span text:style-name="Source_20_Text"><text:span text:style-name="T11">"ViT-B/32"</text:span></text:span><text:span text:style-name="Source_20_Text"><text:span text:style-name="T5">, device=device)</text:span></text:span></text:p>
        <text:p text:style-name="P11"><text:span text:style-name="Source_20_Text"><text:span text:style-name="T5">target_prompt = </text:span></text:span><text:span text:style-name="Source_20_Text"><text:span text:style-name="T11">"anime face"</text:span></text:span></text:p>
        <text:p text:style-name="P11"><text:span text:style-name="Source_20_Text"><text:span text:style-name="T5">text_embed = clip_model.encode_text(clip.tokenize(target_prompt).to(device))</text:span></text:span></text:p>
        <text:p text:style-name="P11"/>
        <text:p text:style-name="P11"><text:span text:style-name="Source_20_Text"><text:span text:style-name="T9">for</text:span></text:span><text:span text:style-name="Source_20_Text"><text:span text:style-name="T5"> step </text:span></text:span><text:span text:style-name="Source_20_Text"><text:span text:style-name="T9">in</text:span></text:span><text:span text:style-name="Source_20_Text"><text:span text:style-name="T5"> </text:span></text:span><text:span text:style-name="Source_20_Text"><text:span text:style-name="T7">range</text:span></text:span><text:span text:style-name="Source_20_Text"><text:span text:style-name="T5">(total_steps):</text:span></text:span></text:p>
        <text:p text:style-name="P11"><text:span text:style-name="Source_20_Text"><text:span text:style-name="T10"><text:s text:c="4"/></text:span></text:span><text:span text:style-name="Source_20_Text"><text:span text:style-name="T5">z = torch.randn(batch_size, latent_dim, device=device)</text:span></text:span></text:p>
        <text:p text:style-name="P11"/>
        <text:p text:style-name="P11"><text:span text:style-name="Source_20_Text"><text:span text:style-name="T10"><text:s text:c="4"/></text:span></text:span><text:span text:style-name="Source_20_Text"><text:span text:style-name="T6"># Генерируем из обучаемой и замороженной моделей</text:span></text:span></text:p>
        <text:p text:style-name="P11"><text:span text:style-name="Source_20_Text"><text:span text:style-name="T10"><text:s text:c="4"/></text:span></text:span><text:span text:style-name="Source_20_Text"><text:span text:style-name="T5">img_train = G_train(z)</text:span></text:span></text:p>
        <text:p text:style-name="P11"><text:span text:style-name="Source_20_Text"><text:span text:style-name="T10"><text:s text:c="4"/></text:span></text:span><text:span text:style-name="Source_20_Text"><text:span text:style-name="T9">with</text:span></text:span><text:span text:style-name="Source_20_Text"><text:span text:style-name="T5"> torch.no_grad():</text:span></text:span></text:p>
        <text:p text:style-name="P11"><text:span text:style-name="Source_20_Text"><text:span text:style-name="T10"><text:s text:c="8"/></text:span></text:span><text:span text:style-name="Source_20_Text"><text:span text:style-name="T5">img_frozen = G_frozen(z)</text:span></text:span></text:p>
        <text:p text:style-name="P11"/>
        <text:p text:style-name="P11"><text:span text:style-name="Source_20_Text"><text:span text:style-name="T10"><text:s text:c="4"/></text:span></text:span><text:span text:style-name="Source_20_Text"><text:span text:style-name="T6"># CLIP loss</text:span></text:span></text:p>
        <text:p text:style-name="P11"><text:span text:style-name="Source_20_Text"><text:span text:style-name="T10"><text:s text:c="4"/></text:span></text:span><text:span text:style-name="Source_20_Text"><text:span text:style-name="T5">img_embed_train = clip_model.encode_image(preprocess(img_train))</text:span></text:span></text:p>
        <text:p text:style-name="P11"><text:span text:style-name="Source_20_Text"><text:span text:style-name="T10"><text:s text:c="4"/></text:span></text:span><text:span text:style-name="Source_20_Text"><text:span text:style-name="T5">clip_loss = -torch.cosine_similarity(img_embed_train, text_embed, dim=</text:span></text:span><text:span text:style-name="Source_20_Text"><text:span text:style-name="T8">1</text:span></text:span><text:span text:style-name="Source_20_Text"><text:span text:style-name="T5">).mean()</text:span></text:span></text:p>
        <text:p text:style-name="P11"/>
        <text:p text:style-name="P11"><text:span text:style-name="Source_20_Text"><text:span text:style-name="T10"><text:s text:c="4"/></text:span></text:span><text:span text:style-name="Source_20_Text"><text:span text:style-name="T6"># Feature consistency loss (можно использовать VGG или CLIP features)</text:span></text:span></text:p>
        <text:p text:style-name="P11"><text:span text:style-name="Source_20_Text"><text:span text:style-name="T10"><text:s text:c="4"/></text:span></text:span><text:span text:style-name="Source_20_Text"><text:span text:style-name="T5">feat_loss = torch.nn.MSELoss()(extract_features(img_train), extract_features(img_frozen))</text:span></text:span></text:p>
        <text:p text:style-name="P11"/>
        <text:p text:style-name="P11"><text:span text:style-name="Source_20_Text"><text:span text:style-name="T10"><text:s text:c="4"/></text:span></text:span><text:span text:style-name="Source_20_Text"><text:span text:style-name="T5">loss = clip_loss * lambda_clip + feat_loss * lambda_feat</text:span></text:span></text:p>
        <text:p text:style-name="P11"/>
        <text:p text:style-name="P11"><text:span text:style-name="Source_20_Text"><text:span text:style-name="T10"><text:s text:c="4"/></text:span></text:span><text:span text:style-name="Source_20_Text"><text:span text:style-name="T5">optimizer.zero_grad()</text:span></text:span></text:p>
        <text:p text:style-name="P11"><text:span text:style-name="Source_20_Text"><text:span text:style-name="T10"><text:s text:c="4"/></text:span></text:span><text:span text:style-name="Source_20_Text"><text:span text:style-name="T5">loss.backward()</text:span></text:span></text:p>
        <text:p text:style-name="P11"><text:span text:style-name="Source_20_Text"><text:span text:style-name="T10"><text:s text:c="4"/></text:span></text:span><text:span text:style-name="Source_20_Text"><text:span text:style-name="T5">optimizer.step()</text:span></text:span></text:p>
        <text:p text:style-name="P2"><text:span text:style-name="Strong_20_Emphasis"><text:span text:style-name="T3">Важные нюансы:</text:span></text:span></text:p>
        <text:list text:style-name="L4">
          <text:list-item>
            <text:p text:style-name="P16"><text:span text:style-name="Strong_20_Emphasis"><text:span text:style-name="T3">Промпты.</text:span></text:span><text:span text:style-name="T4"> На практике используют не один промпт, а ансамбль (например: «anime face», «anime portrait», «stylized anime face», «cartoon face»), чтобы покрыт</text:span><text:soft-page-break/><text:span text:style-name="T4">ь вариативность целевого домена.</text:span></text:p>
          </text:list-item>
          <text:list-item>
            <text:p text:style-name="P16"><text:span text:style-name="Strong_20_Emphasis"><text:span text:style-name="T3">Augmentations.</text:span></text:span><text:span text:style-name="T4"> К изображениям применяют лёгкие аугментации (crop, color jitter), чтобы CLIP не запоминал конкретные текстуры, а учился общему стилю.</text:span></text:p>
          </text:list-item>
          <text:list-item>
            <text:p text:style-name="P17"><text:span text:style-name="Strong_20_Emphasis"><text:span text:style-name="T3">Баланс коэффициентов.</text:span></text:span><text:span text:style-name="T4"> </text:span><text:span text:style-name="Source_20_Text"><text:span text:style-name="T5">lambda_clip</text:span></text:span><text:span text:style-name="T4"> и </text:span><text:span text:style-name="Source_20_Text"><text:span text:style-name="T5">lambda_feat</text:span></text:span><text:span text:style-name="T4"> критически важны. Если </text:span><text:span text:style-name="Source_20_Text"><text:span text:style-name="T5">lambda_clip</text:span></text:span><text:span text:style-name="T4"> слишком большой, модель быстро «улетает» в шум; если слишком маленький — адаптация идёт медленно.</text:span></text:p>
          </text:list-item>
        </text:list>
        <text:p text:style-name="P4"/>
        <text:h text:style-name="P5" text:outline-level="2">Описание эксперимента</text:h>
        <text:p text:style-name="P7">Поскольку ты уже делал эксперименты с кодом в Colab, здесь фокус на том, что именно варьировать и как фиксировать результаты.</text:p>
        <text:p text:style-name="P2"><text:span text:style-name="Strong_20_Emphasis"><text:span text:style-name="T3">Что пробовать:</text:span></text:span></text:p>
        <text:list text:style-name="L5">
          <text:list-item>
            <text:p text:style-name="P18"><text:span text:style-name="Strong_20_Emphasis"><text:span text:style-name="T3">Разные наборы размороженных слоёв.</text:span></text:span><text:span text:style-name="T4"> Например:</text:span></text:p>
            <text:list>
              <text:list-item>
                <text:p text:style-name="P19">Вариант A: размораживать только верхние 40% слоёв.</text:p>
              </text:list-item>
              <text:list-item>
                <text:p text:style-name="P19">Вариант B: размораживать верхние 70%.</text:p>
              </text:list-item>
              <text:list-item>
                <text:p text:style-name="P19">Вариант C: размораживать все слои (baseline).<text:line-break/>Сравниваешь скорость адаптации и качество (FID, визуальная целостность).</text:p>
              </text:list-item>
            </text:list>
          </text:list-item>
          <text:list-item>
            <text:p text:style-name="P18"><text:span text:style-name="Strong_20_Emphasis"><text:span text:style-name="T3">Коэффициенты при лоссе.</text:span></text:span><text:span text:style-name="T4"> Прогоняешь сетку значений:</text:span></text:p>
            <text:list>
              <text:list-item>
                <text:p text:style-name="P20"><text:span text:style-name="Source_20_Text"><text:span text:style-name="T5">lambda_clip</text:span></text:span><text:span text:style-name="T4">: [0.1, 0.5, 1.0, 2.0]</text:span></text:p>
              </text:list-item>
              <text:list-item>
                <text:p text:style-name="P20"><text:span text:style-name="Source_20_Text"><text:span text:style-name="T5">lambda_feat</text:span></text:span><text:span text:style-name="T4">: [0.1, 0.5, 1.0]</text:span></text:p>
              </text:list-item>
            </text:list>
          </text:list-item>
          <text:list-item>
            <text:p text:style-name="P18"><text:span text:style-name="Strong_20_Emphasis"><text:span text:style-name="T3">Ансамбль промптов.</text:span></text:span><text:span text:style-name="T4"> Сравниваешь обучение на одном промпте («anime face») против ансамбля из 3–5 промптов.</text:span></text:p>
          </text:list-item>
          <text:list-item>
            <text:p text:style-name="P18"><text:span text:style-name="Strong_20_Emphasis"><text:span text:style-name="T3">Аугментации.</text:span></text:span><text:span text:style-name="T4"> Проверяешь, как добавление аугментаций влияет на устойчивость стиля.</text:span></text:p>
          </text:list-item>
        </text:list>
        <text:p text:style-name="P2"><text:span text:style-name="Strong_20_Emphasis"><text:span text:style-name="T3">Как фиксировать:</text:span></text:span></text:p>
        <text:list text:style-name="L6">
          <text:list-item>
            <text:p text:style-name="P21"><text:soft-page-break/>Сохраняешь чекпоинты каждые N шагов.</text:p>
          </text:list-item>
          <text:list-item>
            <text:p text:style-name="P21">Каждые K шагов делаешь сэмплы (grid из 16–32 изображений) и считаешь FID относительно целевого датасета (или хотя бы относительно сэмплов G_frozen + аугментации, если нет чистого датасета).</text:p>
          </text:list-item>
          <text:list-item>
            <text:p text:style-name="P22">Визуально сравниваешь «до/после» на одних и тех же латентах <text:span text:style-name="T16">z</text:span>: берёшь один вектор <text:span text:style-name="T16">z</text:span>, прогоняешь через G_frozen и G_train на разных шагах обучения и смотришь, как меняется стиль.</text:p>
          </text:list-item>
        </text:list>
        <text:p text:style-name="P7">Пример организации логов в Colab:</text:p>
        <text:p text:style-name="P10">python</text:p>
        <text:p text:style-name="P11"><text:span text:style-name="Source_20_Text"><text:span text:style-name="T9">import</text:span></text:span><text:span text:style-name="Source_20_Text"><text:span text:style-name="T5"> os</text:span></text:span></text:p>
        <text:p text:style-name="P11"><text:span text:style-name="Source_20_Text"><text:span text:style-name="T5">os.makedirs(</text:span></text:span><text:span text:style-name="Source_20_Text"><text:span text:style-name="T11">"checkpoints"</text:span></text:span><text:span text:style-name="Source_20_Text"><text:span text:style-name="T5">, exist_ok=</text:span></text:span><text:span text:style-name="Source_20_Text"><text:span text:style-name="T8">True</text:span></text:span><text:span text:style-name="Source_20_Text"><text:span text:style-name="T5">)</text:span></text:span></text:p>
        <text:p text:style-name="P11"><text:span text:style-name="Source_20_Text"><text:span text:style-name="T5">os.makedirs(</text:span></text:span><text:span text:style-name="Source_20_Text"><text:span text:style-name="T11">"samples"</text:span></text:span><text:span text:style-name="Source_20_Text"><text:span text:style-name="T5">, exist_ok=</text:span></text:span><text:span text:style-name="Source_20_Text"><text:span text:style-name="T8">True</text:span></text:span><text:span text:style-name="Source_20_Text"><text:span text:style-name="T5">)</text:span></text:span></text:p>
        <text:p text:style-name="P11"/>
        <text:p text:style-name="P11"><text:span text:style-name="Source_20_Text"><text:span text:style-name="T9">if</text:span></text:span><text:span text:style-name="Source_20_Text"><text:span text:style-name="T5"> step % save_every == </text:span></text:span><text:span text:style-name="Source_20_Text"><text:span text:style-name="T8">0</text:span></text:span><text:span text:style-name="Source_20_Text"><text:span text:style-name="T5">:</text:span></text:span></text:p>
        <text:p text:style-name="P11"><text:span text:style-name="Source_20_Text"><text:span text:style-name="T10"><text:s text:c="4"/></text:span></text:span><text:span text:style-name="Source_20_Text"><text:span text:style-name="T5">torch.save(G_train.state_dict(), </text:span></text:span><text:span text:style-name="Source_20_Text"><text:span text:style-name="T11">f"checkpoints/step_</text:span></text:span><text:span text:style-name="Source_20_Text"><text:span text:style-name="T12">{step}</text:span></text:span><text:span text:style-name="Source_20_Text"><text:span text:style-name="T11">.pth"</text:span></text:span><text:span text:style-name="Source_20_Text"><text:span text:style-name="T5">)</text:span></text:span></text:p>
        <text:p text:style-name="P11"><text:span text:style-name="Source_20_Text"><text:span text:style-name="T10"><text:s text:c="4"/></text:span></text:span><text:span text:style-name="Source_20_Text"><text:span text:style-name="T9">with</text:span></text:span><text:span text:style-name="Source_20_Text"><text:span text:style-name="T5"> torch.no_grad():</text:span></text:span></text:p>
        <text:p text:style-name="P11"><text:span text:style-name="Source_20_Text"><text:span text:style-name="T10"><text:s text:c="8"/></text:span></text:span><text:span text:style-name="Source_20_Text"><text:span text:style-name="T5">sample_z = fixed_z[:</text:span></text:span><text:span text:style-name="Source_20_Text"><text:span text:style-name="T8">16</text:span></text:span><text:span text:style-name="Source_20_Text"><text:span text:style-name="T5">] <text:s/></text:span></text:span><text:span text:style-name="Source_20_Text"><text:span text:style-name="T6"># фиксированные латенты для сравнения</text:span></text:span></text:p>
        <text:p text:style-name="P11"><text:span text:style-name="Source_20_Text"><text:span text:style-name="T10"><text:s text:c="8"/></text:span></text:span><text:span text:style-name="Source_20_Text"><text:span text:style-name="T5">sample_imgs = G_train(sample_z)</text:span></text:span></text:p>
        <text:p text:style-name="P11"><text:span text:style-name="Source_20_Text"><text:span text:style-name="T10"><text:s text:c="8"/></text:span></text:span><text:span text:style-name="Source_20_Text"><text:span text:style-name="T5">save_grid(sample_imgs, </text:span></text:span><text:span text:style-name="Source_20_Text"><text:span text:style-name="T11">f"samples/step_</text:span></text:span><text:span text:style-name="Source_20_Text"><text:span text:style-name="T12">{step}</text:span></text:span><text:span text:style-name="Source_20_Text"><text:span text:style-name="T11">.png"</text:span></text:span><text:span text:style-name="Source_20_Text"><text:span text:style-name="T5">)</text:span></text:span></text:p>
        <text:p text:style-name="P4"/>
        <text:h text:style-name="P5" text:outline-level="2">Описание результато<text:span text:style-name="T17">в</text:span></text:h>
        <text:list text:style-name="L7">
          <text:list-item>
            <text:p text:style-name="P23"><text:span text:style-name="Strong_20_Emphasis"><text:span text:style-name="T3">Визуальные примеры.</text:span></text:span><text:span text:style-name="T4"> Grid’ы сэмплов на фиксированных </text:span><text:span text:style-name="T13">z</text:span><text:span text:style-name="T4"> на разных шагах: видно, как модель постепенно «перекрашивает» фотореализм в аниме.</text:span></text:p>
          </text:list-item>
          <text:list-item>
            <text:p text:style-name="P24"><text:span text:style-name="Strong_20_Emphasis"><text:span text:style-name="T3">Графики.</text:span></text:span></text:p>
            <text:list>
              <text:list-item>
                <text:p text:style-name="P25"><text:span text:style-name="T4">Кривая </text:span><text:span text:style-name="Source_20_Text"><text:span text:style-name="T5">loss</text:span></text:span><text:span text:style-name="T4"> (общий и по компонентам).</text:span></text:p>
              </text:list-item>
              <text:list-item>
                <text:p text:style-name="P26">FID по шагам (если есть датасет).</text:p>
              </text:list-item>
              <text:list-item>
                <text:p text:style-name="P26">Косинусное сходство CLIP (image–text) по шагам.</text:p>
              </text:list-item>
            </text:list>
          </text:list-item>
          <text:list-item>
            <text:p text:style-name="P24"><text:span text:style-name="Strong_20_Emphasis"><text:span text:style-name="T3">Сравнение вариантов.</text:span></text:span><text:span text:style-name="T4"> Таблица с результатами разных конфигураций (какие слои + какие лямбды) и короткий вывод, какая комбинация лучше.</text:span></text:p>
          </text:list-item>
          <text:list-item>
            <text:p text:style-name="P24"><text:soft-page-break/><text:span text:style-name="Strong_20_Emphasis"><text:span text:style-name="T3">Редактирование реальных изображений.</text:span></text:span><text:span text:style-name="T4"> Если делаешь инференс на реальных фото (через projection в W+), покажи примеры «было/стало».</text:span></text:p>
          </text:list-item>
        </text:list>
        <text:p text:style-name="P7">Пример того, что можно написать в выводах по графикам:</text:p>
        <text:p text:style-name="P27"><text:span text:style-name="T18">«При </text:span><text:span text:style-name="Source_20_Text"><text:span text:style-name="T5">lambda_clip = 1.0</text:span></text:span><text:span text:style-name="T18"> и </text:span><text:span text:style-name="Source_20_Text"><text:span text:style-name="T5">lambda_feat = 0.5</text:span></text:span><text:span text:style-name="T18"> модель достигает стабильного стиля аниме к 5k шагам без заметной деградации структуры лиц. При </text:span><text:span text:style-name="Source_20_Text"><text:span text:style-name="T5">lambda_feat = 0.1</text:span></text:span><text:span text:style-name="T18"> модель быстрее адаптируется, но иногда теряет симметрию и пропорции.»</text:span></text:p>
        <text:p text:style-name="P4"/>
        <text:h text:style-name="P28" text:outline-level="2"><text:span text:style-name="T19">Выводы (что получилось, что не получилось и почему)</text:span><text:span text:style-name="Strong_20_Emphasis"><text:span text:style-name="T20"> </text:span></text:span></text:h>
        <text:list text:style-name="L8">
          <text:list-item>
            <text:p text:style-name="P29">Быстрая адаптация стиля без больших датасетов. Достаточно пары тысяч шагов на одной GPU.</text:p>
          </text:list-item>
          <text:list-item>
            <text:p text:style-name="P29">Хорошая управляемость через текст: меняя промпт (например, «sketch style»), можно быстро получить другой домен.</text:p>
          </text:list-item>
          <text:list-item>
            <text:p text:style-name="P30"><text:span text:style-name="T4">Сохранение семантики (возраст, эмоции, поза) при правильной настройке </text:span><text:span text:style-name="Source_20_Text"><text:span text:style-name="T5">lambda_feat</text:span></text:span><text:span text:style-name="T4">.</text:span></text:p>
          </text:list-item>
        </text:list>
        <text:p text:style-name="P2"><text:span text:style-name="Strong_20_Emphasis"><text:span text:style-name="T3"/></text:span></text:p>
        <text:list text:style-name="L9">
          <text:list-item>
            <text:p text:style-name="P31"><text:span text:style-name="Strong_20_Emphasis"><text:span text:style-name="T3">«Мыльный» результат или артефакты.</text:span></text:span><text:span text:style-name="T4"> Причина — слишком агрессивный CLIP-loss или неудачный баланс с feature-loss. CLIP может «тянуть» картинку к тексту, жертвуя чёткостью.</text:span></text:p>
          </text:list-item>
          <text:list-item>
            <text:p text:style-name="P31"><text:span text:style-name="Strong_20_Emphasis"><text:span text:style-name="T3">Потеря разнообразия.</text:span></text:span><text:span text:style-name="T4"> Модель начинает выдавать похожие лица или повторяющиеся текстуры. Причина — узкий ансамбль промптов или недостаточная вариативность латентов.</text:span></text:p>
          </text:list-item>
          <text:list-item>
            <text:p text:style-name="P31"><text:span text:style-name="Strong_20_Emphasis"><text:span text:style-name="T3">Нестабильность при сильной адаптации.</text:span></text:span><text:span text:style-name="T4"> Если целевой домен очень далёк (например, фото → пиксель-арт), одних верхних слоёв может не хватить; нужно размораживать и нижние.</text:span></text:p>
          </text:list-item>
          <text:list-item>
            <text:p text:style-name="P31"><text:soft-page-break/><text:span text:style-name="Strong_20_Emphasis"><text:span text:style-name="T3">Зависимость от промпта.</text:span></text:span><text:span text:style-name="T4"> Если промпт слишком общий («face»), модель может слабо адаптироваться; если слишком специфичный («smiling anime girl»), она будет генерировать только улыбки.</text:span></text:p>
          </text:list-item>
        </text:list>
        <text:p text:style-name="P2"><text:span text:style-name="Strong_20_Emphasis"><text:span text:style-name="T3">Практические рекомендации для проекта:</text:span></text:span></text:p>
        <text:list text:style-name="L10">
          <text:list-item>
            <text:p text:style-name="P32"><text:span text:style-name="T4">Начинай с небольшого числа размороженных слоёв (верхние 40–50%) и умеренных лямбд (</text:span><text:span text:style-name="Source_20_Text"><text:span text:style-name="T5">lambda_clip ≈ 1.0</text:span></text:span><text:span text:style-name="T4">, </text:span><text:span text:style-name="Source_20_Text"><text:span text:style-name="T5">lambda_feat ≈ 0.5</text:span></text:span><text:span text:style-name="T4">).</text:span></text:p>
          </text:list-item>
          <text:list-item>
            <text:p text:style-name="P33">Используй ансамбль из 3–5 промптов для целевого домена.</text:p>
          </text:list-item>
          <text:list-item>
            <text:p text:style-name="P33">Фиксируй латенты и делай визуальные сравнения «до/после» — это самый наглядный способ показать успех адаптации.</text:p>
          </text:list-item>
        </text:list>
        <text:p text:style-name="P34">сейчас (например, «запустил StyleGAN‑2, но не пойму, как выделить слои» или «не получается собрать CLIP-loss»), — подскажу конкретный кусок кода под твой пайплайн.</text:p>
        <text:list text:style-name="L11">
          <text:list-item>
            <text:p text:style-name="P35"/>
          </text:list-item>
        </text:list>
      </text:section>
      <text:p text:style-name="P36"><draw:frame draw:style-name="fr1" draw:name="Врезка1" text:anchor-type="char" svg:width="18.203cm" draw:z-index="0"><draw:text-box fo:min-height="0.041cm"><text:p text:style-name="P37"/></draw:text-box></draw:frame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YS Geo" svg:font-family="'YS Geo', apple-system, BlinkMacSystemFont, Arial, Helvetica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SC" style:font-family-asian="'Noto Serif SC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SC" style:font-family-asian="'Noto Serif SC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5T17:57:05.934735800</meta:creation-date>
    <dc:date>2026-06-15T18:10:35.386803500</dc:date>
    <meta:editing-duration>PT39S</meta:editing-duration>
    <meta:editing-cycles>1</meta:editing-cycles>
    <meta:document-statistic meta:table-count="0" meta:image-count="0" meta:object-count="0" meta:page-count="8" meta:paragraph-count="118" meta:word-count="1343" meta:character-count="10427" meta:non-whitespace-character-count="8912"/>
    <meta:generator>LibreOffice/26.2.4.2$Windows_X86_64 LibreOffice_project/0229ac93fcf0d7cbc6376066c6f35021cef002dc</meta:generator>
  </office:meta>
</office:document-meta>
</file>